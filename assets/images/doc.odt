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00000018F1BFFD8C5.png" manifest:media-type="image/png"/>
  <manifest:file-entry manifest:full-path="Pictures/100000010000035B0000017458A693F3.png" manifest:media-type="image/png"/>
  <manifest:file-entry manifest:full-path="Pictures/1000000100000357000001ACED0333B9.png" manifest:media-type="image/png"/>
  <manifest:file-entry manifest:full-path="Pictures/100000010000035A00000239FDFD2428.png" manifest:media-type="image/png"/>
  <manifest:file-entry manifest:full-path="Pictures/100000010000035700000218B38661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2e8"/>
    </style:style>
    <style:style style:name="P2" style:family="paragraph" style:parent-style-name="Standard">
      <style:text-properties officeooo:rsid="00205e9e" officeooo:paragraph-rsid="00205e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4.0161in" draw:z-index="4"><draw:image xlink:href="Pictures/10000001000002B00000018F1BFFD8C5.png" xlink:type="simple" xlink:show="embed" xlink:actuate="onLoad" draw:mime-type="image/png"/></draw:frame><text:line-break/></text:p>
      <text:p text:style-name="P1"/>
      <text:p text:style-name="P1"><draw:frame draw:style-name="fr1" draw:name="Image2" text:anchor-type="char" svg:width="6.9252in" svg:height="4.3409in" draw:z-index="0"><draw:image xlink:href="Pictures/100000010000035700000218B3866176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2" draw:name="Image3" text:anchor-type="char" svg:width="6.9252in" svg:height="4.5917in" draw:z-index="1"><draw:image xlink:href="Pictures/100000010000035A00000239FDFD24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9252in" svg:height="3.4661in" draw:z-index="2"><draw:image xlink:href="Pictures/1000000100000357000001ACED0333B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2"/>
      <text:p text:style-name="P2"><draw:frame draw:style-name="fr1" draw:name="Image5" text:anchor-type="char" svg:width="6.9252in" svg:height="2.9984in" draw:z-index="3"><draw:image xlink:href="Pictures/100000010000035B0000017458A693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4T22:10:44.802367700</meta:creation-date>
    <dc:date>2026-07-14T22:25:04.056561900</dc:date>
    <meta:editing-duration>PT11M49S</meta:editing-duration>
    <meta:editing-cycles>4</meta:editing-cycles>
    <meta:generator>LibreOffice/26.2.4.2$Windows_X86_64 LibreOffice_project/0229ac93fcf0d7cbc6376066c6f35021cef002dc</meta:generator>
    <meta:document-statistic meta:table-count="0" meta:image-count="5" meta:object-count="0" meta:page-count="3" meta:paragraph-count="1" meta:word-count="0" meta:character-count="1" meta:non-whitespace-character-count="0"/>
  </office:meta>
</office:document-meta>
</file>