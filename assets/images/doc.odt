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EB0000038F7C8FB5DC.png" manifest:media-type="image/png"/>
  <manifest:file-entry manifest:full-path="Pictures/10000001000004EC00000391A17BB72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5.0102in" draw:z-index="0"><draw:image xlink:href="Pictures/10000001000004EB0000038F7C8FB5DC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6.9252in" svg:height="5.0173in" draw:z-index="1"><draw:image xlink:href="Pictures/10000001000004EC00000391A17BB72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4T16:19:37.256250500</meta:creation-date>
    <dc:date>2026-07-14T16:21:32.461155800</dc:date>
    <meta:editing-duration>PT1M56S</meta:editing-duration>
    <meta:editing-cycles>1</meta:editing-cycles>
    <meta:document-statistic meta:table-count="0" meta:image-count="2" meta:object-count="0" meta:page-count="2" meta:paragraph-count="1" meta:word-count="0" meta:character-count="1" meta:non-whitespace-character-count="0"/>
    <meta:generator>LibreOffice/26.2.4.2$Windows_X86_64 LibreOffice_project/0229ac93fcf0d7cbc6376066c6f35021cef002dc</meta:generator>
  </office:meta>
</office:document-meta>
</file>